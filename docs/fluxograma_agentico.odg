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2.49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1.406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text-shadow="none" fo:font-weight="bold" style:font-weight-asian="bold" style:font-weight-complex="bold"/>
    </style:style>
    <style:style style:name="P5" style:family="paragraph">
      <style:paragraph-properties fo:text-align="center"/>
      <style:text-properties fo:font-size="6pt" fo:text-shadow="none" fo:font-weight="bold" style:font-size-asian="6pt" style:font-weight-asian="bold" style:font-size-complex="6pt" style:font-weight-complex="bold"/>
    </style:style>
    <style:style style:name="P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text-shadow="none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27cm" svg:x="0.999cm" svg:y="1cm">
          <text:p text:style-name="P1"><text:span text:style-name="T1">Input</text:span></text:p>
          <text:p text:style-name="P1"><text:span text:style-name="T2">Nome de N pokemons</text:span></text:p>
          <text:p text:style-name="P1"><text:span text:style-name="T2">Estratégia de comb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2" draw:text-style-name="P2" xml:id="id2" draw:id="id2" draw:layer="layout" svg:width="3.81cm" svg:height="1.27cm" svg:x="6.715cm" svg:y="1cm">
          <text:p text:style-name="P1"><text:span text:style-name="T1">Agent A</text:span></text:p>
          <text:p text:style-name="P1"><text:span text:style-name="T2">Busca os dados dos pokemons, dados de ataques dos pokemons e dados de items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6.715cm" svg:y="2.905cm">
          <text:p text:style-name="P1"><text:span text:style-name="T1">Agent B</text:span></text:p>
          <text:p text:style-name="P1"><text:span text:style-name="T2">Monta com base na estratégia um conjunto de moveset, habilidade, distribuição de status e item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81cm" svg:height="1.27cm" svg:x="6.715cm" svg:y="4.81cm">
          <text:p text:style-name="P1"><text:span text:style-name="T1">Agent C</text:span></text:p>
          <text:p text:style-name="P1"><text:span text:style-name="T2">Valida regras de equipe como repetição de item e coesão entre os pokemons (reflection).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5.167cm" svg:y1="1.635cm" svg:x2="6.715cm" svg:y2="1.635cm" draw:start-shape="id1" draw:start-glue-point="6" draw:end-shape="id2" draw:end-glue-point="3" svg:d="M5167 1635h1548" svg:viewBox="0 0 1549 1">
          <text:p/>
        </draw:connector>
        <draw:custom-shape draw:style-name="gr4" draw:text-style-name="P2" xml:id="id6" draw:id="id6" draw:layer="layout" svg:width="3.81cm" svg:height="1.271cm" draw:transform="skewX (-0.0106465084371654) translate (11.463cm 6.714cm)">
          <text:p text:style-name="P1"><text:span text:style-name="T2">O time está equilibrad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xml:id="id8" draw:id="id8" draw:layer="layout" svg:width="3.81cm" svg:height="1.271cm" draw:transform="skewX (-0.0106465084371654) translate (11.477cm 8.62cm)">
          <text:p text:style-name="P1"><text:span text:style-name="T2">O time está complet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5" draw:id="id5" draw:layer="layout" svg:width="3.81cm" svg:height="1.27cm" svg:x="6.715cm" svg:y="6.715cm">
          <text:p text:style-name="P1"><text:span text:style-name="T1">Agent D</text:span></text:p>
          <text:p text:style-name="P1"><text:span text:style-name="T2">Verifica os tipos, as velocidades, o status de ataque e de defesa buscando as fraquezas de um time para N pokemons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81cm" svg:height="1.27cm" svg:x="6.715cm" svg:y="8.62cm">
          <text:p text:style-name="P1"><text:span text:style-name="T1">Agent E</text:span></text:p>
          <text:p text:style-name="P1"><text:span text:style-name="T2">Lista pokemons possíveis para o completar as fraquezas do time com base na estratégia e seleciona M pokemons.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3.81cm" svg:height="1.27cm" svg:x="6.715cm" svg:y="10.525cm">
          <text:p text:style-name="P4"><text:span text:style-name="T3">Fi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8.62cm" svg:y1="2.27cm" svg:x2="8.62cm" svg:y2="2.905cm" draw:start-shape="id2" draw:start-glue-point="2" draw:end-shape="id3" draw:end-glue-point="0" svg:d="M8620 2270v635" svg:viewBox="0 0 1 636">
          <text:p/>
        </draw:connector>
        <draw:connector draw:style-name="gr6" draw:text-style-name="P3" draw:layer="layout" draw:type="curve" svg:x1="8.62cm" svg:y1="4.175cm" svg:x2="8.62cm" svg:y2="4.81cm" draw:start-shape="id3" draw:start-glue-point="2" draw:end-shape="id4" draw:end-glue-point="0" svg:d="M8620 4175v635" svg:viewBox="0 0 1 636">
          <text:p/>
        </draw:connector>
        <draw:connector draw:style-name="gr7" draw:text-style-name="P3" draw:layer="layout" draw:type="curve" svg:x1="8.62cm" svg:y1="6.08cm" svg:x2="8.62cm" svg:y2="6.715cm" draw:start-shape="id4" draw:start-glue-point="2" draw:end-shape="id5" draw:end-glue-point="0" svg:d="M8620 6080v635" svg:viewBox="0 0 1 636">
          <text:p/>
        </draw:connector>
        <draw:connector draw:style-name="gr8" draw:text-style-name="P3" draw:layer="layout" draw:type="curve" svg:x1="10.525cm" svg:y1="7.35cm" svg:x2="11.47cm" svg:y2="7.35cm" draw:start-shape="id5" draw:start-glue-point="1" draw:end-shape="id6" draw:end-glue-point="5" svg:d="M10525 7350h945" svg:viewBox="0 0 946 1">
          <text:p/>
        </draw:connector>
        <draw:custom-shape draw:style-name="gr2" draw:text-style-name="P2" xml:id="id7" draw:id="id7" draw:layer="layout" svg:width="3.81cm" svg:height="1.27cm" svg:x="11.477cm" svg:y="4.81cm">
          <text:p text:style-name="P1"><text:span text:style-name="T1">Agent E</text:span></text:p>
          <text:p text:style-name="P1"><text:span text:style-name="T2">Lista pokemons possíveis para o completar as fraquezas do time com base na estratégia e seleciona M pokemon.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3.368cm" svg:y1="6.714cm" svg:x2="13.382cm" svg:y2="6.08cm" draw:start-shape="id6" draw:start-glue-point="4" draw:end-shape="id7" draw:end-glue-point="2" svg:d="M13368 6714c0-475 14-159 14-634" svg:viewBox="0 0 15 635">
          <text:p text:style-name="P1"><text:span text:style-name="T2"><text:s text:c="14"/>Não</text:span></text:p>
        </draw:connector>
        <draw:connector draw:style-name="gr10" draw:text-style-name="P6" draw:layer="layout" draw:type="curve" svg:x1="13.382cm" svg:y1="7.985cm" svg:x2="13.382cm" svg:y2="8.62cm" draw:start-shape="id6" draw:start-glue-point="6" draw:end-shape="id8" draw:end-glue-point="4" svg:d="M13382 7985v635" svg:viewBox="0 0 1 636">
          <text:p text:style-name="P1"><text:span text:style-name="T2"><text:s text:c="14"/>Sim</text:span></text:p>
        </draw:connector>
        <draw:connector draw:style-name="gr11" draw:text-style-name="P6" draw:layer="layout" draw:type="curve" svg:x1="11.484cm" svg:y1="9.256cm" svg:x2="10.525cm" svg:y2="9.255cm" draw:start-shape="id8" draw:start-glue-point="5" draw:end-shape="id9" draw:end-glue-point="1" svg:d="M11484 9256c-718 0-239-1-959-1" svg:viewBox="0 0 960 2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Não</text:span></text:p>
        </draw:connector>
        <draw:connector draw:style-name="gr12" draw:text-style-name="P6" draw:layer="layout" draw:type="curve" svg:x1="13.396cm" svg:y1="9.891cm" svg:x2="10.525cm" svg:y2="11.16cm" draw:start-shape="id8" draw:start-glue-point="6" draw:end-shape="id10" draw:end-glue-point="1" svg:d="M13396 9891c0 846-957 1269-2871 1269" svg:viewBox="0 0 2872 1270">
          <text:p text:style-name="P1"><text:span text:style-name="T2"/></text:p>
          <text:p text:style-name="P1"><text:span text:style-name="T2"/></text:p>
          <text:p text:style-name="P1"><text:span text:style-name="T2">Sim</text:span></text:p>
        </draw:connector>
        <draw:connector draw:style-name="gr13" draw:text-style-name="P3" draw:layer="layout" draw:type="curve" svg:x1="6.715cm" svg:y1="9.255cm" svg:x2="6.715cm" svg:y2="1.635cm" draw:start-shape="id9" draw:start-glue-point="3" draw:end-shape="id2" draw:end-glue-point="3" svg:d="M6715 9255c-751 0-751-7620 0-7620" svg:viewBox="0 0 564 7621">
          <text:p/>
        </draw:connector>
        <draw:connector draw:style-name="gr14" draw:text-style-name="P3" draw:layer="layout" draw:type="curve" svg:x1="13.382cm" svg:y1="4.81cm" svg:x2="10.525cm" svg:y2="1.635cm" draw:start-shape="id7" draw:start-glue-point="0" draw:end-shape="id2" draw:end-glue-point="1" svg:d="M13382 4810c0-2117-952-3175-2857-3175" svg:viewBox="0 0 2858 31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3T08:23:50.739089047</meta:creation-date>
    <dc:date>2026-06-03T08:46:45.367404414</dc:date>
    <meta:editing-duration>PT10M56S</meta:editing-duration>
    <meta:editing-cycles>2</meta:editing-cycles>
    <meta:generator>LibreOffice/26.2.3.2$Linux_X86_64 LibreOffice_project/d4d5ed47b6084125f28d269a5650105d54dde034</meta:generator>
    <meta:print-date>2026-06-03T08:43:43.809432194</meta:print-date>
    <meta:printed-by>PDF files</meta:printed-by>
    <meta:document-statistic meta:object-count="21"/>
  </office:meta>
</office:document-meta>
</file>